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F000000BEB9A8DCE8.png" manifest:media-type="image/png"/>
  <manifest:file-entry manifest:full-path="Pictures/10000000000004E80000023249323855.png" manifest:media-type="image/png"/>
  <manifest:file-entry manifest:full-path="Pictures/100000000000077F000004112228D0C6.png" manifest:media-type="image/png"/>
  <manifest:file-entry manifest:full-path="Pictures/100000000000023E000001F552C8E5E6.png" manifest:media-type="image/png"/>
  <manifest:file-entry manifest:full-path="Pictures/10000000000007790000026BB3313391.png" manifest:media-type="image/png"/>
  <manifest:file-entry manifest:full-path="Pictures/10000000000005C70000030052539B36.png" manifest:media-type="image/png"/>
  <manifest:file-entry manifest:full-path="Pictures/1000000000000220000001F21BE784BD.png" manifest:media-type="image/png"/>
  <manifest:file-entry manifest:full-path="Pictures/1000000000000283000000802722B432.png" manifest:media-type="image/png"/>
  <manifest:file-entry manifest:full-path="Pictures/10000000000002DC00000142CD760833.png" manifest:media-type="image/png"/>
  <manifest:file-entry manifest:full-path="Pictures/1000000000000197000000A84D502FAC.png" manifest:media-type="image/png"/>
  <manifest:file-entry manifest:full-path="Pictures/100000000000036B000000D8D2BB44C5.png" manifest:media-type="image/png"/>
  <manifest:file-entry manifest:full-path="Pictures/100000010000077F0000043704198E50.png" manifest:media-type="image/png"/>
  <manifest:file-entry manifest:full-path="Pictures/1000000000000388000000540538794F.png" manifest:media-type="image/png"/>
  <manifest:file-entry manifest:full-path="Pictures/10000000000001AB000000D54D578590.png" manifest:media-type="image/png"/>
  <manifest:file-entry manifest:full-path="Pictures/10000000000007790000040EB1A316AE.png" manifest:media-type="image/png"/>
  <manifest:file-entry manifest:full-path="Pictures/100000000000021A000000E19B48290A.png" manifest:media-type="image/png"/>
  <manifest:file-entry manifest:full-path="Pictures/10000000000001BF000000C7219F42B2.png" manifest:media-type="image/png"/>
  <manifest:file-entry manifest:full-path="Pictures/10000000000005E00000032069F58F68.png" manifest:media-type="image/png"/>
  <manifest:file-entry manifest:full-path="Pictures/10000000000003850000019301C35819.png" manifest:media-type="image/png"/>
  <manifest:file-entry manifest:full-path="Pictures/1000000000000204000000DE4E6F6134.png" manifest:media-type="image/png"/>
  <manifest:file-entry manifest:full-path="Pictures/1000000000000187000003230548FA19.png" manifest:media-type="image/png"/>
  <manifest:file-entry manifest:full-path="Pictures/1000000000000424000003891BBB6BC9.png" manifest:media-type="image/png"/>
  <manifest:file-entry manifest:full-path="Pictures/10000000000002610000027C4F214EBD.png" manifest:media-type="image/png"/>
  <manifest:file-entry manifest:full-path="Pictures/10000000000001FB00000250DCD760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1b1b1b" loext:opacity="100%" fo:font-size="18pt" fo:font-weight="bold" officeooo:paragraph-rsid="000e4c38" fo:background-color="transparent" style:font-name-asian="Arial1" style:font-size-asian="18pt" style:font-weight-asian="bold" style:font-name-complex="Arial1" style:font-size-complex="18pt" style:font-weight-complex="bold"/>
    </style:style>
    <style:style style:name="P2" style:family="paragraph" style:parent-style-name="Standard">
      <style:paragraph-properties fo:text-align="center" style:justify-single-word="false"/>
      <style:text-properties officeooo:paragraph-rsid="000e4c38"/>
    </style:style>
    <style:style style:name="P3" style:family="paragraph" style:parent-style-name="Standard">
      <style:paragraph-properties fo:text-align="center" style:justify-single-word="false"/>
      <style:text-properties fo:color="#1b1b1b" loext:opacity="100%" fo:font-size="18pt" officeooo:paragraph-rsid="000e4c38" fo:background-color="transparent" style:font-name-asian="Arial1" style:font-size-asian="18pt" style:font-name-complex="Arial1" style:font-size-complex="18pt"/>
    </style:style>
    <style:style style:name="P4" style:family="paragraph" style:parent-style-name="Standard">
      <style:paragraph-properties fo:margin-top="0in" fo:margin-bottom="0.139in" style:contextual-spacing="false" fo:text-align="center" style:justify-single-word="false"/>
      <style:text-properties fo:color="#1b1b1b" loext:opacity="100%" fo:font-size="24pt" fo:font-weight="bold" officeooo:paragraph-rsid="000e4c38" fo:background-color="transparent" style:font-name-asian="Arial1" style:font-size-asian="24pt" style:font-weight-asian="bold" style:font-name-complex="Arial1" style:font-size-complex="24pt" style:font-weight-complex="bold"/>
    </style:style>
    <style:style style:name="P5" style:family="paragraph" style:parent-style-name="Standard">
      <style:paragraph-properties fo:margin-top="0in" fo:margin-bottom="0.139in" style:contextual-spacing="false" fo:text-align="center" style:justify-single-word="false"/>
      <style:text-properties officeooo:paragraph-rsid="000e4c38"/>
    </style:style>
    <style:style style:name="P6" style:family="paragraph" style:parent-style-name="Standard">
      <style:paragraph-properties fo:margin-top="0in" fo:margin-bottom="0.278in" style:contextual-spacing="false" fo:text-align="center" style:justify-single-word="false"/>
      <style:text-properties officeooo:paragraph-rsid="000e4c38"/>
    </style:style>
    <style:style style:name="P7" style:family="paragraph" style:parent-style-name="Standard">
      <style:paragraph-properties fo:margin-left="0.5in" fo:margin-top="0.1945in" fo:margin-bottom="0in" style:contextual-spacing="false" fo:line-height="115%" fo:text-indent="0in" style:auto-text-indent="false"/>
      <style:text-properties officeooo:paragraph-rsid="000e4c38"/>
    </style:style>
    <style:style style:name="P8" style:family="paragraph" style:parent-style-name="Standard">
      <style:paragraph-properties fo:margin-left="0.5in" fo:margin-top="0in" fo:margin-bottom="0in" style:contextual-spacing="false" fo:line-height="115%" fo:text-indent="0in" style:auto-text-indent="false"/>
      <style:text-properties officeooo:paragraph-rsid="000e4c38"/>
    </style:style>
    <style:style style:name="P9" style:family="paragraph" style:parent-style-name="Standard">
      <style:paragraph-properties fo:margin-left="0.5in" fo:margin-top="0in" fo:margin-bottom="0in" style:contextual-spacing="false" fo:line-height="115%" fo:text-indent="0in" style:auto-text-indent="false"/>
      <style:text-properties officeooo:paragraph-rsid="00115f01"/>
    </style:style>
    <style:style style:name="P10" style:family="paragraph" style:parent-style-name="Standard">
      <style:paragraph-properties fo:margin-left="0.5in" fo:margin-top="0in" fo:margin-bottom="0in" style:contextual-spacing="false" fo:line-height="115%" fo:text-indent="0in" style:auto-text-indent="false"/>
      <style:text-properties fo:color="#000000" loext:opacity="100%" style:text-outline="false" style:text-line-through-style="none" style:text-line-through-type="none" style:font-name="Liberation Sans" fo:font-size="11pt" fo:font-style="normal" fo:text-shadow="none" style:text-underline-style="none" fo:font-weight="bold" officeooo:paragraph-rsid="000e4c38" style:font-name-asian="Arial1" style:font-size-asian="11pt" style:font-style-asian="normal" style:font-weight-asian="bold" style:font-name-complex="Arial1" style:font-size-complex="11pt" style:font-style-complex="normal" style:font-weight-complex="bold"/>
    </style:style>
    <style:style style:name="P11" style:family="paragraph" style:parent-style-name="Standard">
      <style:paragraph-properties fo:margin-left="0.5in" fo:margin-top="0.1945in" fo:margin-bottom="0in" style:contextual-spacing="false" fo:line-height="100%" fo:text-indent="0in" style:auto-text-indent="false"/>
      <style:text-properties officeooo:paragraph-rsid="000e4c38"/>
    </style:style>
    <style:style style:name="P12" style:family="paragraph" style:parent-style-name="Standard">
      <style:paragraph-properties fo:margin-left="0.5in" fo:margin-top="0in" fo:margin-bottom="0in" style:contextual-spacing="false" fo:line-height="100%" fo:text-indent="0in" style:auto-text-indent="false"/>
      <style:text-properties officeooo:paragraph-rsid="000e4c38"/>
    </style:style>
    <style:style style:name="P13" style:family="paragraph" style:parent-style-name="Standard">
      <style:paragraph-properties fo:margin-top="0in" fo:margin-bottom="0in" style:contextual-spacing="false" fo:line-height="100%"/>
      <style:text-properties style:font-name="Times New Roman" fo:font-size="12pt" fo:font-style="italic" fo:font-weight="bold" officeooo:paragraph-rsid="000e4c38" style:font-name-asian="Times New Roman1" style:font-size-asian="12pt"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margin-top="0in" fo:margin-bottom="0in" style:contextual-spacing="false" fo:line-height="100%"/>
      <style:text-properties style:font-name="Times New Roman" fo:font-size="12pt" officeooo:paragraph-rsid="000e4c38" style:font-name-asian="Times New Roman1" style:font-size-asian="12pt" style:font-name-complex="Times New Roman1" style:font-size-complex="12pt"/>
    </style:style>
    <style:style style:name="P15" style:family="paragraph" style:parent-style-name="Heading_20_1">
      <style:paragraph-properties fo:margin-left="0in" fo:margin-top="0in" fo:margin-bottom="0.0835in" style:contextual-spacing="false" fo:text-align="center" style:justify-single-word="false" fo:text-indent="0in" style:auto-text-indent="false"/>
      <style:text-properties fo:color="#1f3864" loext:opacity="100%" fo:font-size="20pt" style:text-underline-style="solid" style:text-underline-width="auto" style:text-underline-color="font-color" fo:font-weight="bold" officeooo:paragraph-rsid="000e4c38" style:font-name-asian="Arial1" style:font-size-asian="20pt" style:font-weight-asian="bold" style:font-name-complex="Arial1" style:font-size-complex="20pt" style:font-weight-complex="bold"/>
    </style:style>
    <style:style style:name="P16" style:family="paragraph" style:parent-style-name="Heading_20_2">
      <style:paragraph-properties fo:margin-left="0in" fo:margin-top="0.2083in" fo:margin-bottom="0.0835in" style:contextual-spacing="false" fo:text-align="center" style:justify-single-word="false" fo:text-indent="0in" style:auto-text-indent="false"/>
      <style:text-properties fo:color="#1f3864" loext:opacity="100%" fo:font-size="15pt" fo:font-weight="bold" officeooo:paragraph-rsid="000e4c38" style:font-name-asian="Arial1" style:font-size-asian="15pt" style:font-weight-asian="bold" style:font-name-complex="Arial1" style:font-size-complex="15pt" style:font-weight-complex="bold"/>
    </style:style>
    <style:style style:name="P17" style:family="paragraph" style:parent-style-name="Text_20_body">
      <style:text-properties officeooo:rsid="000e4c38" officeooo:paragraph-rsid="000e4c38"/>
    </style:style>
    <style:style style:name="P18" style:family="paragraph" style:parent-style-name="Heading_20_3">
      <style:paragraph-properties fo:margin-top="0in" fo:margin-bottom="0in" style:contextual-spacing="false"/>
    </style:style>
    <style:style style:name="P19" style:family="paragraph" style:parent-style-name="Text_20_body">
      <style:text-properties fo:color="#000000" loext:opacity="100%" officeooo:rsid="000e4c38" officeooo:paragraph-rsid="000e4c38"/>
    </style:style>
    <style:style style:name="P20" style:family="paragraph" style:parent-style-name="Text_20_body">
      <style:text-properties fo:color="#000000" loext:opacity="100%" officeooo:rsid="000e4c38" officeooo:paragraph-rsid="000f660b"/>
    </style:style>
    <style:style style:name="P21" style:family="paragraph" style:parent-style-name="Heading_20_3">
      <style:paragraph-properties fo:margin-top="0in" fo:margin-bottom="0in" style:contextual-spacing="false"/>
      <style:text-properties officeooo:paragraph-rsid="0012f853"/>
    </style:style>
    <style:style style:name="P22" style:family="paragraph" style:parent-style-name="Text_20_body">
      <style:text-properties fo:color="#000000" loext:opacity="100%" officeooo:rsid="000f660b" officeooo:paragraph-rsid="000f660b"/>
    </style:style>
    <style:style style:name="P23" style:family="paragraph" style:parent-style-name="Heading_20_2">
      <style:text-properties fo:font-style="italic" style:text-underline-style="none" fo:font-weight="bold" officeooo:paragraph-rsid="0012f853" style:font-style-asian="italic" style:font-weight-asian="bold" style:font-style-complex="italic" style:font-weight-complex="bold"/>
    </style:style>
    <style:style style:name="P24" style:family="paragraph" style:parent-style-name="Standard">
      <style:text-properties fo:color="#1f2937" loext:opacity="100%" fo:font-size="11pt" officeooo:paragraph-rsid="000f660b" style:font-name-asian="Arial1" style:font-size-asian="11pt" style:font-name-complex="Arial1" style:font-size-complex="11pt"/>
    </style:style>
    <style:style style:name="P25" style:family="paragraph" style:parent-style-name="Heading_20_1">
      <style:paragraph-properties fo:margin-left="0in" fo:margin-top="0in" fo:margin-bottom="0.0835in" style:contextual-spacing="false" fo:text-align="center" style:justify-single-word="false" fo:text-indent="0in" style:auto-text-indent="false" fo:break-before="page"/>
      <style:text-properties officeooo:paragraph-rsid="000f660b"/>
    </style:style>
    <style:style style:name="P26" style:family="paragraph" style:parent-style-name="Heading_20_2">
      <style:paragraph-properties fo:margin-left="0in" fo:margin-top="0.2083in" fo:margin-bottom="0.0835in" style:contextual-spacing="false" fo:text-align="center" style:justify-single-word="false" fo:text-indent="0in" style:auto-text-indent="false"/>
      <style:text-properties fo:color="#1f3864" loext:opacity="100%" fo:font-size="15pt" fo:font-weight="bold" officeooo:paragraph-rsid="000f660b" style:font-size-asian="15pt" style:font-weight-asian="bold" style:font-size-complex="15pt" style:font-weight-complex="bold"/>
    </style:style>
    <style:style style:name="P27" style:family="paragraph" style:parent-style-name="Standard">
      <style:text-properties fo:color="#1f2937" loext:opacity="100%" fo:font-size="11pt" officeooo:rsid="0010f69e" officeooo:paragraph-rsid="0010f69e" style:font-name-asian="Arial1" style:font-size-asian="11pt" style:font-name-complex="Arial1" style:font-size-complex="11pt"/>
    </style:style>
    <style:style style:name="P28" style:family="paragraph" style:parent-style-name="Heading_20_1">
      <style:paragraph-properties fo:margin-left="0in" fo:margin-top="0in" fo:margin-bottom="0.0835in" style:contextual-spacing="false" fo:text-align="center" style:justify-single-word="false" fo:text-indent="0in" style:auto-text-indent="false" fo:break-before="page"/>
      <style:text-properties fo:color="#1f2937" loext:opacity="100%" fo:font-size="11pt" officeooo:paragraph-rsid="000f660b" style:font-name-asian="Arial1" style:font-size-asian="11pt" style:font-name-complex="Arial1" style:font-size-complex="11pt"/>
    </style:style>
    <style:style style:name="P29" style:family="paragraph" style:parent-style-name="Standard">
      <style:text-properties fo:color="#1f2937" loext:opacity="100%" fo:font-size="11pt" officeooo:paragraph-rsid="0014cdee" style:font-name-asian="Arial1" style:font-size-asian="11pt" style:font-name-complex="Arial1" style:font-size-complex="11pt"/>
    </style:style>
    <style:style style:name="P30" style:family="paragraph" style:parent-style-name="Heading_20_3">
      <style:paragraph-properties fo:margin-top="0in" fo:margin-bottom="0in" style:contextual-spacing="false"/>
      <style:text-properties officeooo:paragraph-rsid="0014cdee"/>
    </style:style>
    <style:style style:name="P31" style:family="paragraph" style:parent-style-name="Text_20_body">
      <style:paragraph-properties fo:margin-top="0in" fo:margin-bottom="0in" style:contextual-spacing="false"/>
      <style:text-properties officeooo:paragraph-rsid="0014cdee"/>
    </style:style>
    <style:style style:name="P32" style:family="paragraph" style:parent-style-name="Text_20_body">
      <style:text-properties fo:color="#000000" loext:opacity="100%" officeooo:rsid="000e4c38" officeooo:paragraph-rsid="00163830"/>
    </style:style>
    <style:style style:name="P33" style:family="paragraph" style:parent-style-name="Text_20_body">
      <style:text-properties fo:color="#000000" loext:opacity="100%" officeooo:rsid="000e4c38" officeooo:paragraph-rsid="001744e7"/>
    </style:style>
    <style:style style:name="P34" style:family="paragraph" style:parent-style-name="Heading_20_2">
      <style:text-properties fo:font-style="italic" style:text-underline-style="none" fo:font-weight="bold" officeooo:paragraph-rsid="001744e7" style:font-style-asian="italic" style:font-weight-asian="bold" style:font-style-complex="italic" style:font-weight-complex="bold"/>
    </style:style>
    <style:style style:name="P35" style:family="paragraph" style:parent-style-name="Standard">
      <style:text-properties officeooo:paragraph-rsid="001744e7"/>
    </style:style>
    <style:style style:name="P36" style:family="paragraph" style:parent-style-name="Heading_20_1">
      <style:paragraph-properties fo:margin-left="0in" fo:margin-top="0in" fo:margin-bottom="0.0835in" style:contextual-spacing="false" fo:text-align="center" style:justify-single-word="false" fo:text-indent="0in" style:auto-text-indent="false" fo:break-before="page"/>
      <style:text-properties officeooo:paragraph-rsid="001744e7"/>
    </style:style>
    <style:style style:name="P37" style:family="paragraph" style:parent-style-name="Heading_20_2">
      <style:paragraph-properties fo:margin-left="0in" fo:margin-top="0.2083in" fo:margin-bottom="0.0835in" style:contextual-spacing="false" fo:text-align="center" style:justify-single-word="false" fo:text-indent="0in" style:auto-text-indent="false"/>
      <style:text-properties fo:color="#1f3864" loext:opacity="100%" fo:font-size="15pt" fo:font-weight="bold" officeooo:paragraph-rsid="001744e7" style:font-size-asian="15pt" style:font-weight-asian="bold" style:font-size-complex="15pt" style:font-weight-complex="bold"/>
    </style:style>
    <style:style style:name="P38" style:family="paragraph" style:parent-style-name="Standard">
      <style:text-properties fo:color="#1f2937" loext:opacity="100%" fo:font-size="11pt" officeooo:paragraph-rsid="001744e7" style:font-name-asian="Arial1" style:font-size-asian="11pt" style:font-name-complex="Arial1" style:font-size-complex="11pt"/>
    </style:style>
    <style:style style:name="P39" style:family="paragraph" style:parent-style-name="Text_20_body">
      <style:text-properties fo:color="#374151" loext:opacity="100%" fo:font-size="10pt" fo:font-style="italic" officeooo:rsid="000e4c38" officeooo:paragraph-rsid="001744e7" style:font-name-asian="Arial1" style:font-size-asian="10pt" style:font-style-asian="italic" style:font-name-complex="Arial1" style:font-size-complex="10pt" style:font-style-complex="italic"/>
    </style:style>
    <style:style style:name="P40" style:family="paragraph" style:parent-style-name="Heading_20_1">
      <style:paragraph-properties fo:margin-left="0in" fo:margin-top="0in" fo:margin-bottom="0.0835in" style:contextual-spacing="false" fo:text-align="center" style:justify-single-word="false" fo:text-indent="0in" style:auto-text-indent="false" fo:break-before="page"/>
      <style:text-properties officeooo:paragraph-rsid="001902b7"/>
    </style:style>
    <style:style style:name="P41" style:family="paragraph" style:parent-style-name="Text_20_body">
      <style:text-properties fo:color="#000000" loext:opacity="100%" officeooo:rsid="000e4c38" officeooo:paragraph-rsid="0017efa2"/>
    </style:style>
    <style:style style:name="P42" style:family="paragraph" style:parent-style-name="Heading_20_1">
      <style:paragraph-properties fo:margin-left="0in" fo:margin-top="0in" fo:margin-bottom="0.0835in" style:contextual-spacing="false" fo:text-indent="0in" style:auto-text-indent="false" fo:break-before="page"/>
      <style:text-properties officeooo:paragraph-rsid="001bd6f9"/>
    </style:style>
    <style:style style:name="P43" style:family="paragraph" style:parent-style-name="Text_20_body">
      <style:text-properties officeooo:paragraph-rsid="001d62e0"/>
    </style:style>
    <style:style style:name="P44" style:family="paragraph" style:parent-style-name="Text_20_body">
      <style:text-properties fo:color="#000000" loext:opacity="100%" fo:font-style="italic" style:text-underline-style="none" fo:font-weight="bold" officeooo:rsid="000e4c38" officeooo:paragraph-rsid="001d62e0" style:font-style-asian="italic" style:font-weight-asian="bold" style:font-style-complex="italic" style:font-weight-complex="bold"/>
    </style:style>
    <style:style style:name="P45" style:family="paragraph" style:parent-style-name="Text_20_body">
      <style:text-properties fo:font-style="italic" style:text-underline-style="none" fo:font-weight="bold" officeooo:paragraph-rsid="001d62e0" style:font-style-asian="italic" style:font-weight-asian="bold" style:font-style-complex="italic" style:font-weight-complex="bold"/>
    </style:style>
    <style:style style:name="P46" style:family="paragraph" style:parent-style-name="Text_20_body">
      <style:text-properties fo:color="#1f3864" loext:opacity="100%" fo:font-size="20pt" style:text-underline-style="solid" style:text-underline-width="auto" style:text-underline-color="font-color" fo:font-weight="bold" officeooo:paragraph-rsid="00163830" style:font-name-asian="Arial1" style:font-size-asian="20pt" style:font-weight-asian="bold" style:font-name-complex="Arial1" style:font-size-complex="20pt" style:font-weight-complex="bold"/>
    </style:style>
    <style:style style:name="T1" style:family="text">
      <style:text-properties fo:color="#1b1b1b" loext:opacity="100%" fo:font-size="18pt" fo:font-weight="bold" fo:background-color="transparent" loext:char-shading-value="0" style:font-name-asian="Arial1" style:font-size-asian="18pt" style:font-weight-asian="bold" style:font-name-complex="Arial1" style:font-size-complex="18pt" style:font-weight-complex="bold"/>
    </style:style>
    <style:style style:name="T2" style:family="text">
      <style:text-properties fo:color="#1b1b1b" loext:opacity="100%" fo:font-size="18pt" fo:background-color="transparent" loext:char-shading-value="0" style:font-name-asian="Arial1" style:font-size-asian="18pt" style:font-name-complex="Arial1" style:font-size-complex="18pt"/>
    </style:style>
    <style:style style:name="T3" style:family="text">
      <style:text-properties fo:color="#1b1b1b" loext:opacity="100%" fo:font-size="24pt" fo:font-weight="bold" fo:background-color="transparent" loext:char-shading-value="0" style:font-name-asian="Arial1" style:font-size-asian="24pt" style:font-weight-asian="bold" style:font-name-complex="Arial1" style:font-size-complex="24pt" style:font-weight-complex="bold"/>
    </style:style>
    <style:style style:name="T4" style:family="text">
      <style:text-properties fo:color="#1b1b1b" loext:opacity="100%" fo:font-size="14pt" fo:font-style="italic" style:text-underline-style="solid" style:text-underline-width="auto" style:text-underline-color="font-color" fo:font-weight="bold" fo:background-color="transparent" loext:char-shading-value="0" style:font-name-asian="Arial1" style:font-size-asian="14pt" style:font-style-asian="italic" style:font-weight-asian="bold" style:font-name-complex="Arial1" style:font-size-complex="14pt" style:font-style-complex="italic" style:font-weight-complex="bold"/>
    </style:style>
    <style:style style:name="T5" style:family="text">
      <style:text-properties fo:font-weight="bold" style:font-weight-asian="bold" style:font-weight-complex="bold"/>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7" style:family="text">
      <style:text-properties fo:color="#000000" loext:opacity="100%" style:text-outline="false" style:text-line-through-style="none" style:text-line-through-type="none" style:font-name="Liberation Sans"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8" style:family="text">
      <style:text-properties fo:color="#000000" loext:opacity="100%" style:text-outline="false" style:text-line-through-style="none" style:text-line-through-type="none" style:font-name="Liberation Sans" fo:font-size="11pt" fo:font-style="normal" fo:text-shadow="none" style:text-underline-style="none" fo:font-weight="bold" officeooo:rsid="00115f01" style:font-name-asian="Arial1" style:font-size-asian="11pt" style:font-style-asian="normal" style:font-weight-asian="bold" style:font-name-complex="Arial1" style:font-size-complex="11pt" style:font-style-complex="normal"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style:text-underline-style="solid" style:text-underline-width="auto" style:text-underline-color="font-color"/>
    </style:style>
    <style:style style:name="T13" style:family="text">
      <style:text-properties fo:color="#1f3864" loext:opacity="100%" style:font-name="Arial" fo:font-size="15pt" fo:font-weight="bold" style:font-name-asian="Arial1" style:font-size-asian="15pt" style:font-weight-asian="bold" style:font-name-complex="Arial1" style:font-size-complex="15pt" style:font-weight-complex="bold"/>
    </style:style>
    <style:style style:name="T14" style:family="text">
      <style:text-properties fo:color="#000000" loext:opacity="100%"/>
    </style:style>
    <style:style style:name="T15" style:family="text">
      <style:text-properties fo:color="#1f2937" loext:opacity="100%" fo:font-size="11pt" style:font-name-asian="Arial1" style:font-size-asian="11pt" style:font-name-complex="Arial1" style:font-size-complex="11pt"/>
    </style:style>
    <style:style style:name="T16" style:family="text">
      <style:text-properties fo:color="#1f3864" loext:opacity="100%" fo:font-size="20pt" style:text-underline-style="solid" style:text-underline-width="auto" style:text-underline-color="font-color" fo:font-weight="bold" style:font-size-asian="20pt" style:font-weight-asian="bold" style:font-size-complex="20pt" style:font-weight-complex="bold"/>
    </style:style>
    <style:style style:name="T17" style:family="text">
      <style:text-properties fo:color="#1f3864" loext:opacity="100%" fo:font-size="15pt" fo:font-weight="bold" style:font-name-asian="Arial1" style:font-size-asian="15pt" style:font-weight-asian="bold" style:font-name-complex="Arial1" style:font-size-complex="15pt" style:font-weight-complex="bold"/>
    </style:style>
    <style:style style:name="T18" style:family="text">
      <style:text-properties officeooo:rsid="0014cdee"/>
    </style:style>
    <style:style style:name="T19" style:family="text">
      <style:text-properties fo:color="#000000" loext:opacity="100%" fo:font-weight="bold" officeooo:rsid="000e4c38" style:font-weight-asian="bold" style:font-weight-complex="bold"/>
    </style:style>
    <style:style style:name="T20" style:family="text">
      <style:text-properties officeooo:rsid="00163830"/>
    </style:style>
    <style:style style:name="T21" style:family="text">
      <style:text-properties fo:color="#000000" loext:opacity="100%" officeooo:rsid="000e4c38"/>
    </style:style>
    <style:style style:name="T22" style:family="text">
      <style:text-properties fo:color="#1f2937" loext:opacity="100%" fo:font-size="11pt" officeooo:rsid="0014cdee" style:font-name-asian="Arial1" style:font-size-asian="11pt" style:font-name-complex="Arial1" style:font-size-complex="11pt"/>
    </style:style>
    <style:style style:name="T23" style:family="text">
      <style:text-properties officeooo:rsid="001744e7"/>
    </style:style>
    <style:style style:name="T24" style:family="text">
      <style:text-properties fo:color="#1f3864" loext:opacity="100%" fo:font-size="20pt" style:text-underline-style="solid" style:text-underline-width="auto" style:text-underline-color="font-color" fo:font-weight="bold" officeooo:rsid="001744e7" style:font-size-asian="20pt" style:font-weight-asian="bold" style:font-size-complex="20pt" style:font-weight-complex="bold"/>
    </style:style>
    <style:style style:name="T25" style:family="text">
      <style:text-properties fo:color="#1f3864" loext:opacity="100%" fo:font-size="20pt" style:text-underline-style="solid" style:text-underline-width="auto" style:text-underline-color="font-color" fo:font-weight="bold" style:font-name-asian="Arial1" style:font-size-asian="20pt" style:font-weight-asian="bold" style:font-name-complex="Arial1" style:font-size-complex="20pt" style:font-weight-complex="bold"/>
    </style:style>
    <style:style style:name="T26" style:family="text">
      <style:text-properties fo:color="#1f3864" loext:opacity="100%" fo:font-size="20pt" style:text-underline-style="solid" style:text-underline-width="auto" style:text-underline-color="font-color" fo:font-weight="bold" officeooo:rsid="001902b7" style:font-size-asian="20pt" style:font-weight-asian="bold" style:font-size-complex="20pt" style:font-weight-complex="bold"/>
    </style:style>
    <style:style style:name="T27" style:family="text">
      <style:text-properties officeooo:rsid="001bd6f9"/>
    </style:style>
    <style:style style:name="T28" style:family="text">
      <style:text-properties fo:color="#1f3864" loext:opacity="100%" fo:font-size="20pt" fo:font-weight="bold" style:font-name-asian="Arial1" style:font-size-asian="20pt" style:font-weight-asian="bold" style:font-name-complex="Arial1" style:font-size-complex="20pt" style:font-weight-complex="bold"/>
    </style:style>
    <style:style style:name="T29" style:family="text">
      <style:text-properties officeooo:rsid="001d62e0"/>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Inline_20_Heading">
      <style:graphic-properties style:vertical-pos="middle" style:vertical-rel="text" style:horizontal-pos="from-left" style:horizontal-rel="paragraph-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9091in, 4.3083in, 0in, 4.274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draw:frame draw:style-name="fr1" draw:name="Image1" text:anchor-type="char" svg:y="0.0008in" svg:width="7.2681in" svg:height="1.7937in" draw:z-index="0"><draw:image xlink:href="Pictures/100000000000036B000000D8D2BB44C5.png" xlink:type="simple" xlink:show="embed" xlink:actuate="onLoad" draw:mime-type="image/png"/></draw:frame></text:p>
      <text:p text:style-name="P1" loext:marker-style-name="T1"/>
      <text:p text:style-name="P2" loext:marker-style-name="T1"><text:span text:style-name="T1">BIT3208: Advanced Web Design and Development</text:span></text:p>
      <text:p text:style-name="P3" loext:marker-style-name="T2"/>
      <text:p text:style-name="P2" loext:marker-style-name="T2"><text:span text:style-name="T2">Mount Kenya University</text:span></text:p>
      <text:p text:style-name="P4" loext:marker-style-name="T3"/>
      <text:p text:style-name="P5" loext:marker-style-name="T3"><text:span text:style-name="T3">Hospital Ward Management System</text:span></text:p>
      <text:p text:style-name="P6" loext:marker-style-name="T4"><text:span text:style-name="T4">Weekly Practical Logbook</text:span></text:p>
      <text:p text:style-name="P7" loext:marker-style-name="T5"><text:span text:style-name="T6">Student Name: Lewis Leshan</text:span></text:p>
      <text:p text:style-name="P8" loext:marker-style-name="T5"><text:span text:style-name="T6">Admission Number: BSCCS/2024/74848</text:span></text:p>
      <text:p text:style-name="P8" loext:marker-style-name="T5"><text:span text:style-name="T6">Course/Class: Computer science</text:span></text:p>
      <text:p text:style-name="P8" loext:marker-style-name="T6"><text:span text:style-name="T6">Unit Code: BIT3208</text:span></text:p>
      <text:p text:style-name="P8" loext:marker-style-name="T6"><text:span text:style-name="T6">Unit Name: Advanced Web Design and Development</text:span></text:p>
      <text:p text:style-name="P8" loext:marker-style-name="T5"><text:span text:style-name="T6">Lecturer Name: Michael Nyoro</text:span></text:p>
      <text:p text:style-name="P8" loext:marker-style-name="T6"><text:span text:style-name="T6">Semester/Academic Year: Year 3 Sem 2</text:span></text:p>
      <text:p text:style-name="P8"><text:span text:style-name="T6">GitHub Portfolio: </text:span><text:a xlink:type="simple" xlink:href="https://github.com/lewiiileshan/Hospital-ward.git" text:style-name="Internet_20_link" text:visited-style-name="Visited_20_Internet_20_Link"><text:span text:style-name="Internet_20_link"><text:span text:style-name="T7">https://github.com/lewiiileshan/Hospital-ward.git</text:span></text:span></text:a></text:p>
      <text:p text:style-name="P9"><text:span text:style-name="Internet_20_link"><text:span text:style-name="T8">Figma Link: https://www.figma.com/make/nSUi1JkvdNhJoEpTBSrvA9/Design-hospital-ward-layout?t=JwJco84ng5xCASoW-1</text:span></text:span></text:p>
      <text:p text:style-name="P10" loext:marker-style-name="T7"/>
      <text:p text:style-name="P11" loext:marker-style-name="T9"><text:span text:style-name="T10">Project Title: Hospitalward</text:span></text:p>
      <text:p text:style-name="P12" loext:marker-style-name="T9"><text:span text:style-name="T10">Selected Technologies: PHP + MySQL, Figma, HTML + CSS, </text:span></text:p>
      <text:p text:style-name="P13" loext:marker-style-name="T10"/>
      <text:p text:style-name="P13" loext:marker-style-name="T10"/>
      <text:p text:style-name="P14" loext:marker-style-name="T11"/>
      <text:p text:style-name="P14" loext:marker-style-name="T11"/>
      <text:p text:style-name="P14" loext:marker-style-name="T11"/>
      <text:p text:style-name="P14" loext:marker-style-name="T11"/>
      <text:p text:style-name="P14" loext:marker-style-name="T11"><text:soft-page-break/></text:p>
      <text:p text:style-name="P14" loext:marker-style-name="T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index-body>
      </text:table-of-content>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text:soft-page-break/></text:p>
      <text:p text:style-name="P14" loext:marker-style-name="T11"/>
      <text:h text:style-name="P15" text:outline-level="1" loext:marker-style-name="T12"><text:bookmark-start text:name="__RefHeading___Toc1089_2539841754 Copy 1"/>Week 1: Local Environment Setup<text:bookmark-end text:name="__RefHeading___Toc1089_2539841754 Copy 1"/></text:h>
      <text:h text:style-name="P16" text:outline-level="2" loext:marker-style-name="T13"><text:bookmark-start text:name="__RefHeading___Toc1091_2539841754 Copy 1"/>Required Evidence<text:bookmark-end text:name="__RefHeading___Toc1091_2539841754 Copy 1"/></text:h>
      <text:p text:style-name="P17"><draw:frame draw:style-name="fr2" draw:name="Image2" text:anchor-type="char" svg:width="6.9252in" svg:height="0.6429in" draw:z-index="1"><draw:image xlink:href="Pictures/1000000000000388000000540538794F.png" xlink:type="simple" xlink:show="embed" xlink:actuate="onLoad" draw:mime-type="image/png"/></draw:frame><text:span text:style-name="T14"><draw:frame draw:style-name="fr3" draw:name="Frame4" text:anchor-type="as-char" draw:z-index="11"><draw:text-box fo:min-height="0.0161in" fo:min-width="0.0161in"><text:h text:style-name="P18" text:outline-level="3">Figure 1:</text:h></draw:text-box></draw:frame></text:span><text:span text:style-name="T14"><text:s/>Installation of XAMPP</text:span></text:p>
      <text:p text:style-name="P19"/>
      <text:p text:style-name="P19"><draw:frame draw:style-name="fr4" draw:name="Image3" text:anchor-type="char" svg:x="0.0209in" svg:y="-0.0945in" svg:width="4.448in" svg:height="2.2189in" draw:z-index="2"><draw:image xlink:href="Pictures/10000000000001AB000000D54D578590.png" xlink:type="simple" xlink:show="embed" xlink:actuate="onLoad" draw:mime-type="image/png"/></draw:frame></text:p>
      <text:p text:style-name="P19"/>
      <text:p text:style-name="P19"/>
      <text:p text:style-name="P19"/>
      <text:p text:style-name="P19"/>
      <text:p text:style-name="P19"/>
      <text:p text:style-name="P19"/>
      <text:p text:style-name="P19"><draw:frame draw:style-name="fr3" draw:name="Frame3" text:anchor-type="as-char" draw:z-index="8"><draw:text-box fo:min-height="0.0161in" fo:min-width="0.0161in"><text:h text:style-name="P18" text:outline-level="3">Figure 2:</text:h></draw:text-box></draw:frame><text:s/>XAMPP and MySQL services running (terminal output)</text:p>
      <text:p text:style-name="P19"><draw:frame draw:style-name="fr5" draw:name="Image4" text:anchor-type="char" svg:width="6.9252in" svg:height="3.7571in" draw:z-index="3"><draw:image xlink:href="Pictures/10000000000007790000040EB1A316AE.png" xlink:type="simple" xlink:show="embed" xlink:actuate="onLoad" draw:mime-type="image/png"/></draw:frame><draw:frame draw:style-name="fr3" draw:name="Frame2" text:anchor-type="as-char" draw:z-index="7"><draw:text-box fo:min-height="0.0161in" fo:min-width="0.0161in"><text:h text:style-name="P18" text:outline-level="3">Figure 3:</text:h></draw:text-box></draw:frame><text:s/>Browser showing phpmyadmin dashboard confirming Apache is serving pages</text:p>
      <text:p text:style-name="P19"><text:soft-page-break/></text:p>
      <text:p text:style-name="P19"/>
      <text:p text:style-name="P20"><draw:frame draw:style-name="fr6" draw:name="Image5" text:anchor-type="char" svg:width="5.3752in" svg:height="2.3126in" draw:z-index="4"><draw:image xlink:href="Pictures/1000000000000204000000DE4E6F6134.png" xlink:type="simple" xlink:show="embed" xlink:actuate="onLoad" draw:mime-type="image/png"/></draw:frame><text:span text:style-name="T5"><draw:frame draw:style-name="fr3" draw:name="Frame1" text:anchor-type="as-char" draw:z-index="5"><draw:text-box fo:min-height="0.0161in" fo:min-width="0.0161in"><text:h text:style-name="P21" text:outline-level="3">Figure 4:</text:h></draw:text-box></draw:frame></text:span><text:s/>Hello World test page running successfully</text:p>
      <text:p text:style-name="P20"/>
      <text:p text:style-name="P22"><draw:frame draw:style-name="fr6" draw:name="Image6" text:anchor-type="char" svg:width="5.6043in" svg:height="2.3437in" draw:z-index="6"><draw:image xlink:href="Pictures/100000000000021A000000E19B48290A.png" xlink:type="simple" xlink:show="embed" xlink:actuate="onLoad" draw:mime-type="image/png"/></draw:frame><draw:frame draw:style-name="fr3" draw:name="Frame5" text:anchor-type="as-char" draw:z-index="9"><draw:text-box fo:min-height="0.0161in" fo:min-width="0.0161in"><text:h text:style-name="P18" text:outline-level="3">Figure 5: </text:h></draw:text-box></draw:frame>PHP-MySQL connection test -page confirming successful database connection</text:p>
      <text:p text:style-name="P22"/>
      <text:h text:style-name="P23" text:outline-level="2"><text:bookmark-start text:name="__RefHeading___Toc1093_2539841754"/>Student Reflection<text:bookmark-end text:name="__RefHeading___Toc1093_2539841754"/></text:h>
      <text:p text:style-name="P24" loext:marker-style-name="T15">This week I set up my local development environment. I installed and configured XAMPP on Kali Linux and verified that Apache and MySQL services were running. I tested the localhost server by creating a simple PHP Hello World page. I then opened phpMyAdmin and confirmed the database server was accessible. The connection test using PDO in PHP confirmed that the backend environment was ready for development. This setup is the foundation for all subsequent development work.</text:p>
      <text:p text:style-name="P24" loext:marker-style-name="T15"/>
      <text:p text:style-name="P24" loext:marker-style-name="T15"/>
      <text:p text:style-name="P24" loext:marker-style-name="T15"/>
      <text:p text:style-name="P24" loext:marker-style-name="T15"/>
      <text:p text:style-name="P24" loext:marker-style-name="T15"/>
      <text:p text:style-name="P24" loext:marker-style-name="T15"/>
      <text:p text:style-name="P24" loext:marker-style-name="T15"/>
      <text:p text:style-name="P24" loext:marker-style-name="T15"/>
      <text:h text:style-name="P25" text:outline-level="1" loext:marker-style-name="T12"><text:bookmark-start text:name="__RefHeading___Toc1095_2539841754 Copy 1 Copy 1 Copy 1 Copy 1"/><text:span text:style-name="T16">Week 2: Wireframes and GUI Design</text:span><text:bookmark-end text:name="__RefHeading___Toc1095_2539841754 Copy 1 Copy 1 Copy 1 Copy 1"/></text:h>
      <text:h text:style-name="P26" text:outline-level="2" loext:marker-style-name="T17"><text:bookmark-start text:name="__RefHeading___Toc1097_2539841754 Copy 1 Copy 1 Copy 1 Copy 1"/>Required Evidence<text:bookmark-end text:name="__RefHeading___Toc1097_2539841754 Copy 1 Copy 1 Copy 1 Copy 1"/></text:h>
      <text:p text:style-name="P24" loext:marker-style-name="T15"/>
      <text:p text:style-name="P24" loext:marker-style-name="T15"/>
      <text:p text:style-name="P24" loext:marker-style-name="T15"/>
      <text:p text:style-name="P27" loext:marker-style-name="T15"><draw:frame draw:style-name="fr7" draw:name="Image7" text:anchor-type="char" svg:width="6.9252in" svg:height="3.8929in" draw:z-index="12"><draw:image xlink:href="Pictures/100000010000077F0000043704198E50.png" xlink:type="simple" xlink:show="embed" xlink:actuate="onLoad" draw:mime-type="image/png"/></draw:frame><draw:frame draw:style-name="fr3" draw:name="Frame6" text:anchor-type="as-char" draw:z-index="10"><draw:text-box fo:min-height="0.0161in" fo:min-width="0.0161in"><text:h text:style-name="P18" text:outline-level="3">Figure 1:</text:h></draw:text-box></draw:frame><text:s/>Wireframe of the <text:span text:style-name="T18">Dashboard</text:span> page showing form fields and layout</text:p>
      <text:p text:style-name="P24" loext:marker-style-name="T15"/>
      <text:p text:style-name="P24" loext:marker-style-name="T15"/>
      <text:p text:style-name="P24" loext:marker-style-name="T15"/>
      <text:p text:style-name="P24" loext:marker-style-name="T15"/>
      <text:h text:style-name="P28" text:outline-level="1" loext:marker-style-name="T12"/>
      <text:p text:style-name="Text_20_body"><draw:frame draw:style-name="fr8" draw:name="Image8" text:anchor-type="char" svg:width="6.9252in" svg:height="3.6835in" draw:z-index="13"><draw:image xlink:href="Pictures/10000000000005E00000032069F58F68.png" xlink:type="simple" xlink:show="embed" xlink:actuate="onLoad" draw:mime-type="image/png"/></draw:frame><text:span text:style-name="T19"><draw:frame draw:style-name="fr3" draw:name="Frame7" text:anchor-type="as-char" draw:z-index="14"><draw:text-box fo:min-height="0.0161in" fo:min-width="0.0161in"><text:h text:style-name="P21" text:outline-level="3">Figure <text:span text:style-name="T20">2</text:span>:</text:h></draw:text-box></draw:frame></text:span><text:span text:style-name="T21"><text:s/>Hello World test page running successfully</text:span> </text:p>
      <text:p text:style-name="P29" loext:marker-style-name="T15"><text:span text:style-name="T22"/></text:p>
      <text:p text:style-name="P24" loext:marker-style-name="T15"/>
      <text:p text:style-name="P24" loext:marker-style-name="T15"/>
      <text:p text:style-name="P24" loext:marker-style-name="T15"/>
      <text:p text:style-name="P24" loext:marker-style-name="T15"/>
      <text:p text:style-name="P24" loext:marker-style-name="T15"/>
      <text:p text:style-name="P24" loext:marker-style-name="T15"/>
      <text:p text:style-name="P24" loext:marker-style-name="T15"/>
      <text:p text:style-name="P24" loext:marker-style-name="T15"/>
      <text:p text:style-name="P24" loext:marker-style-name="T15"/>
      <text:p text:style-name="P24" loext:marker-style-name="T15"/>
      <text:p text:style-name="P24" loext:marker-style-name="T15"/>
      <text:p text:style-name="P24" loext:marker-style-name="T15"/>
      <text:p text:style-name="P24" loext:marker-style-name="T15"/>
      <text:p text:style-name="P24" loext:marker-style-name="T15"/>
      <text:h text:style-name="P30" text:outline-level="3"/>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draw:frame draw:style-name="fr4" draw:name="Image9" text:anchor-type="char" svg:x="0.5209in" svg:y="0.0654in" svg:width="4.0728in" svg:height="8.3646in" draw:z-index="15"><draw:image xlink:href="Pictures/1000000000000187000003230548FA19.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pan text:style-name="T5"><draw:frame draw:style-name="fr3" draw:name="Frame8" text:anchor-type="as-char" draw:z-index="16"><draw:text-box fo:min-height="0.0161in" fo:min-width="0.0161in"><text:h text:style-name="P21" text:outline-level="3">Figure <text:span text:style-name="T20">3</text:span>:</text:h></draw:text-box></draw:frame></text:span><text:s/><text:span text:style-name="T20">Mobile view of the login page </text:span></text:p>
      <text:p text:style-name="P32"/>
      <text:p text:style-name="P32"><text:soft-page-break/></text:p>
      <text:p text:style-name="P32"><draw:frame draw:style-name="fr9" draw:name="Image10" text:anchor-type="char" svg:width="4.6563in" svg:height="2.0728in" draw:z-index="17"><draw:image xlink:href="Pictures/10000000000001BF000000C7219F42B2.png" xlink:type="simple" xlink:show="embed" xlink:actuate="onLoad" draw:mime-type="image/png"/></draw:frame></text:p>
      <text:p text:style-name="P32"/>
      <text:p text:style-name="P32"/>
      <text:p text:style-name="P32"/>
      <text:p text:style-name="P32"/>
      <text:p text:style-name="P32"/>
      <text:p text:style-name="P32"/>
      <text:p text:style-name="P32"><text:span text:style-name="T5"><draw:frame draw:style-name="fr3" draw:name="Frame9" text:anchor-type="as-char" draw:z-index="18"><draw:text-box fo:min-height="0.0161in" fo:min-width="0.0161in"><text:h text:style-name="P21" text:outline-level="3">Figure <text:span text:style-name="T20">4</text:span>:</text:h></draw:text-box></draw:frame></text:span><text:s/><text:span text:style-name="T20">Colour Scheeme choice is green and White/Black</text:span></text:p>
      <text:p text:style-name="P32"/>
      <text:p text:style-name="P33"><draw:frame draw:style-name="fr8" draw:name="Image11" text:anchor-type="char" svg:width="6.9252in" svg:height="5.9126in" draw:z-index="19"><draw:image xlink:href="Pictures/1000000000000424000003891BBB6BC9.png" xlink:type="simple" xlink:show="embed" xlink:actuate="onLoad" draw:mime-type="image/png"/></draw:frame><text:span text:style-name="T5"><draw:frame draw:style-name="fr3" draw:name="Frame10" text:anchor-type="as-char" draw:z-index="20"><draw:text-box fo:min-height="0.0161in" fo:min-width="0.0161in"><text:h text:style-name="P21" text:outline-level="3">Figure <text:span text:style-name="T23">5</text:span>:</text:h></draw:text-box></draw:frame></text:span><text:s/><text:span text:style-name="T23">Digital Mockup/ Figma system UI </text:span></text:p>
      <text:p text:style-name="P32"><text:soft-page-break/></text:p>
      <text:p text:style-name="P32"/>
      <text:p text:style-name="P32"/>
      <text:h text:style-name="P34" text:outline-level="2"><text:bookmark-start text:name="__RefHeading___Toc1093_2539841754 Copy 1"/>Student Reflection<text:bookmark-end text:name="__RefHeading___Toc1093_2539841754 Copy 1"/></text:h>
      <text:p text:style-name="P35" loext:marker-style-name="T15"><text:span text:style-name="T15">This week I planned the visual design of the Hospital Ward Management System. I drew wireframes for three main pages: the login/register forms, the patient dashboard, and the add patient form. Green was selected as the primary color to reflect a medical/health theme. The dashboard layout was designed to display patient information clearly with action buttons on the right.</text:span></text:p>
      <text:p text:style-name="P32"/>
      <text:p text:style-name="P32"/>
      <text:p text:style-name="P32"/>
      <text:h text:style-name="P36" text:outline-level="1" loext:marker-style-name="T12"><text:bookmark-start text:name="__RefHeading___Toc1095_2539841754 Copy 1 Copy 1 Copy 1 Copy 1 Copy 1"/><text:span text:style-name="T16">Week </text:span><text:span text:style-name="T24">3</text:span><text:span text:style-name="T16">: </text:span><text:span text:style-name="T25">JavaScript Validation and PHP Basics</text:span><text:bookmark-end text:name="__RefHeading___Toc1095_2539841754 Copy 1 Copy 1 Copy 1 Copy 1 Copy 1"/></text:h>
      <text:h text:style-name="P37" text:outline-level="2" loext:marker-style-name="T17"><text:bookmark-start text:name="__RefHeading___Toc1097_2539841754 Copy 1 Copy 1 Copy 1 Copy 1 Copy 1"/>Required Evidence<text:bookmark-end text:name="__RefHeading___Toc1097_2539841754 Copy 1 Copy 1 Copy 1 Copy 1 Copy 1"/></text:h>
      <text:p text:style-name="P38" loext:marker-style-name="T15"/>
      <text:p text:style-name="P38" loext:marker-style-name="T15"/>
      <text:p text:style-name="P38" loext:marker-style-name="T15"><draw:frame draw:style-name="fr9" draw:name="Image12" text:anchor-type="char" svg:width="5.2811in" svg:height="6.1665in" draw:z-index="23"><draw:image xlink:href="Pictures/10000000000001FB00000250DCD7605D.png" xlink:type="simple" xlink:show="embed" xlink:actuate="onLoad" draw:mime-type="image/png"/></draw:frame></text:p>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3"><text:span text:style-name="T5"><draw:frame draw:style-name="fr3" draw:name="Frame11" text:anchor-type="as-char" draw:z-index="21"><draw:text-box fo:min-height="0.0161in" fo:min-width="0.0161in"><text:h text:style-name="P21" text:outline-level="3">Figure <text:span text:style-name="T23">1</text:span>:</text:h></draw:text-box></draw:frame></text:span><text:s/>JavaScript form validation on the registration form preventing empty submissions</text:p>
      <text:p text:style-name="P39"/>
      <text:p text:style-name="P33"/>
      <text:p text:style-name="P33"/>
      <text:p text:style-name="P33"/>
      <text:p text:style-name="P33"/>
      <text:p text:style-name="P33"><text:soft-page-break/></text:p>
      <text:p text:style-name="P33"><draw:frame draw:style-name="fr6" draw:name="Image13" text:anchor-type="char" svg:width="6.3437in" svg:height="6.6252in" draw:z-index="24"><draw:image xlink:href="Pictures/10000000000002610000027C4F214EBD.png" xlink:type="simple" xlink:show="embed" xlink:actuate="onLoad" draw:mime-type="image/png"/></draw:frame><text:span text:style-name="T5"><draw:frame draw:style-name="fr3" draw:name="Frame12" text:anchor-type="as-char" draw:z-index="25"><draw:text-box fo:min-height="0.0161in" fo:min-width="0.0161in"><text:h text:style-name="P21" text:outline-level="3">Figure <text:span text:style-name="T23">2</text:span>:</text:h></draw:text-box></draw:frame></text:span><text:s/>Password mismatch error shown when confirm password does not match</text:p>
      <text:p text:style-name="P33"/>
      <text:p text:style-name="P33"/>
      <text:p text:style-name="P33"/>
      <text:p text:style-name="P33"/>
      <text:p text:style-name="P33"/>
      <text:p text:style-name="P33"/>
      <text:p text:style-name="P33"/>
      <text:p text:style-name="P33"><draw:frame draw:style-name="fr9" draw:name="Image14" text:anchor-type="char" svg:width="4.2398in" svg:height="1.75in" draw:z-index="26"><draw:image xlink:href="Pictures/1000000000000197000000A84D502FAC.png" xlink:type="simple" xlink:show="embed" xlink:actuate="onLoad" draw:mime-type="image/png"/></draw:frame><text:soft-page-break/></text:p>
      <text:p text:style-name="P33"/>
      <text:p text:style-name="P33"/>
      <text:p text:style-name="P33"/>
      <text:p text:style-name="P33"/>
      <text:p text:style-name="P33"/>
      <text:p text:style-name="P33"><text:span text:style-name="T5"><draw:frame draw:style-name="fr3" draw:name="Frame13" text:anchor-type="as-char" draw:z-index="27"><draw:text-box fo:min-height="0.0161in" fo:min-width="0.0161in"><text:h text:style-name="P21" text:outline-level="3">Figure <text:span text:style-name="T23">3</text:span>:</text:h></draw:text-box></draw:frame></text:span><text:s/>PHP syntax practice -simple variable echo and conditional statement output</text:p>
      <text:p text:style-name="P33"/>
      <text:p text:style-name="P33"><draw:frame draw:style-name="fr8" draw:name="Image15" text:anchor-type="char" svg:width="6.9252in" svg:height="3.0457in" draw:z-index="28"><draw:image xlink:href="Pictures/10000000000002DC00000142CD760833.png" xlink:type="simple" xlink:show="embed" xlink:actuate="onLoad" draw:mime-type="image/png"/></draw:frame><draw:frame draw:style-name="fr3" draw:name="Frame14" text:anchor-type="as-char" draw:z-index="29"><draw:text-box fo:min-height="0.0161in" fo:min-width="0.0161in"><text:h text:style-name="P21" text:outline-level="3">Figure <text:span text:style-name="T23">4</text:span>:</text:h></draw:text-box></draw:frame><text:s/>db.php code and successful database connection output in the browser</text:p>
      <text:p text:style-name="P33"/>
      <text:p text:style-name="P33"><draw:frame draw:style-name="fr6" draw:name="Image16" text:anchor-type="char" svg:width="5.6665in" svg:height="5.1874in" draw:z-index="30"><draw:image xlink:href="Pictures/1000000000000220000001F21BE784BD.png" xlink:type="simple" xlink:show="embed" xlink:actuate="onLoad" draw:mime-type="image/png"/></draw:frame><text:soft-page-break/><text:span text:style-name="T5"><draw:frame draw:style-name="fr3" draw:name="Frame15" text:anchor-type="as-char" draw:z-index="31"><draw:text-box fo:min-height="0.0161in" fo:min-width="0.0161in"><text:h text:style-name="P21" text:outline-level="3">Figure <text:span text:style-name="T23">5</text:span>:</text:h></draw:text-box></draw:frame></text:span><text:s/>Dynamic PHP page displaying user-submitted form data back on screen</text:p>
      <text:h text:style-name="P34" text:outline-level="2"><text:bookmark-start text:name="__RefHeading___Toc1093_2539841754 Copy 2"/>Student Reflection<text:bookmark-end text:name="__RefHeading___Toc1093_2539841754 Copy 2"/></text:h>
      <text:p text:style-name="P38" loext:marker-style-name="T15">This week I practiced JavaScript and PHP basics. I added client-side validation to the registration form to prevent empty fields from being submitted. I also added a password confirmation check. On the PHP side, I practiced outputting variables, using conditionals, and processing POST form data. I wrote the db.php using PHP's PDO library to connect to the MySQL database. The connection was confirmed to work perfrctly.</text:p>
      <text:p text:style-name="P38" loext:marker-style-name="T15"/>
      <text:p text:style-name="P38" loext:marker-style-name="T15"/>
      <text:p text:style-name="P38" loext:marker-style-name="T15"/>
      <text:h text:style-name="P40" text:outline-level="1" loext:marker-style-name="T12"><text:bookmark-start text:name="__RefHeading___Toc1095_2539841754 Copy 1 Copy 1 Copy 1 Copy 1 Copy 2"/><text:span text:style-name="T16">Week </text:span><text:span text:style-name="T26">4</text:span><text:span text:style-name="T16">: </text:span><text:span text:style-name="T25">Backend Authentication System</text:span><text:bookmark-end text:name="__RefHeading___Toc1095_2539841754 Copy 1 Copy 1 Copy 1 Copy 1 Copy 2"/></text:h>
      <text:h text:style-name="P37" text:outline-level="2" loext:marker-style-name="T17"><text:bookmark-start text:name="__RefHeading___Toc1097_2539841754 Copy 1 Copy 1 Copy 1 Copy 1 Copy 2"/>Required Evidence<text:bookmark-end text:name="__RefHeading___Toc1097_2539841754 Copy 1 Copy 1 Copy 1 Copy 1 Copy 2"/></text:h>
      <text:p text:style-name="P38" loext:marker-style-name="T15"/>
      <text:p text:style-name="P38" loext:marker-style-name="T15"/>
      <text:p text:style-name="P38" loext:marker-style-name="T15"/>
      <text:p text:style-name="P33"><draw:frame draw:style-name="fr8" draw:name="Image17" text:anchor-type="char" svg:width="6.9252in" svg:height="3.5957in" draw:z-index="32"><draw:image xlink:href="Pictures/10000000000005C70000030052539B36.png" xlink:type="simple" xlink:show="embed" xlink:actuate="onLoad" draw:mime-type="image/png"/></draw:frame><text:span text:style-name="T5"><draw:frame draw:style-name="fr3" draw:name="Frame16" text:anchor-type="as-char" draw:z-index="33"><draw:text-box fo:min-height="0.0161in" fo:min-width="0.0161in"><text:h text:style-name="P21" text:outline-level="3">Figure <text:span text:style-name="T23">1</text:span>:</text:h></draw:text-box></draw:frame></text:span><text:s/>Dashboard page showing the username feedback from login</text:p>
      <text:p text:style-name="P38" loext:marker-style-name="T15"><draw:frame draw:style-name="fr10" draw:name="Image18" text:anchor-type="char" svg:x="0.0583in" svg:y="0.1709in" svg:width="3.9425in" svg:height="1.9244in" draw:z-index="34"><draw:image xlink:href="Pictures/10000000000007790000026BB3313391.png" xlink:type="simple" xlink:show="embed" xlink:actuate="onLoad" draw:mime-type="image/png"/></draw:frame></text:p>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3"><text:span text:style-name="T5"><draw:frame draw:style-name="fr3" draw:name="Frame17" text:anchor-type="as-char" draw:z-index="35"><draw:text-box fo:min-height="0.0161in" fo:min-width="0.0161in"><text:h text:style-name="P21" text:outline-level="3">Figure <text:span text:style-name="T23">2</text:span>:</text:h></draw:text-box></draw:frame></text:span><text:s/>Registration form with all fields required</text:p>
      <text:p text:style-name="P38" loext:marker-style-name="T15"/>
      <text:p text:style-name="P38" loext:marker-style-name="T15"/>
      <text:p text:style-name="P38" loext:marker-style-name="T15"/>
      <text:p text:style-name="P38" loext:marker-style-name="T15"/>
      <text:p text:style-name="P33"/>
      <text:p text:style-name="P33"/>
      <text:p text:style-name="P33"/>
      <text:p text:style-name="P41"><draw:frame draw:style-name="fr9" draw:name="Image19" text:anchor-type="char" svg:width="5.9791in" svg:height="5.2189in" draw:z-index="36"><draw:image xlink:href="Pictures/100000000000023E000001F552C8E5E6.png" xlink:type="simple" xlink:show="embed" xlink:actuate="onLoad" draw:mime-type="image/png"/></draw:frame><text:soft-page-break/><text:span text:style-name="T5"><draw:frame draw:style-name="fr3" draw:name="Frame18" text:anchor-type="as-char" draw:z-index="37"><draw:text-box fo:min-height="0.0161in" fo:min-width="0.0161in"><text:h text:style-name="P21" text:outline-level="3">Figure <text:span text:style-name="T23">3</text:span>:</text:h></draw:text-box></draw:frame></text:span><text:s/>Error message shown on login page when wrong credentials are entered</text:p>
      <text:p text:style-name="P33"/>
      <text:p text:style-name="P41"><draw:frame draw:style-name="fr8" draw:name="Image20" text:anchor-type="char" svg:width="6.9252in" svg:height="3.0972in" draw:z-index="38"><draw:image xlink:href="Pictures/10000000000003850000019301C35819.png" xlink:type="simple" xlink:show="embed" xlink:actuate="onLoad" draw:mime-type="image/png"/></draw:frame><text:span text:style-name="T5"><draw:frame draw:style-name="fr3" draw:name="Frame20" text:anchor-type="as-char" draw:z-index="39"><draw:text-box fo:min-height="0.0161in" fo:min-width="0.0161in"><text:h text:style-name="P21" text:outline-level="3">Figure <text:span text:style-name="T27">4</text:span>:</text:h></draw:text-box></draw:frame></text:span><text:s/>Folder structure on the project folder</text:p>
      <text:p text:style-name="P33"><text:soft-page-break/></text:p>
      <text:p text:style-name="P33"/>
      <text:p text:style-name="P33"/>
      <text:p text:style-name="P33"/>
      <text:p text:style-name="P33"/>
      <text:p text:style-name="P33"/>
      <text:p text:style-name="P33"/>
      <text:p text:style-name="P33"/>
      <text:p text:style-name="P41"/>
      <text:p text:style-name="P41"><text:span text:style-name="T5"><draw:frame draw:style-name="fr3" draw:name="Frame19" text:anchor-type="as-char" draw:z-index="22"><draw:text-box fo:min-height="0.0161in" fo:min-width="0.0161in"><text:h text:style-name="P21" text:outline-level="3">Figure <text:span text:style-name="T27">5</text:span>:</text:h></draw:text-box></draw:frame></text:span><text:s/>Login.php showing the password authentication code</text:p>
      <text:p text:style-name="P41"/>
      <text:h text:style-name="P34" text:outline-level="2"><text:bookmark-start text:name="__RefHeading___Toc1093_2539841754 Copy 2 Copy 1"/>Student Reflection<text:bookmark-end text:name="__RefHeading___Toc1093_2539841754 Copy 2 Copy 1"/></text:h>
      <text:p text:style-name="P35" loext:marker-style-name="T15"><text:span text:style-name="T15">This week I built the full authentication system. The register.php page collects name, email, and password, validates the input, checks for duplicate emails, then stores the account using PHP's password_hash() function so passwords are never stored in plain text. The login.php page retrieves the user by email and uses password_verify() to check credentials. PHP sessions store the logged-in user's ID and name.</text:span></text:p>
      <text:p text:style-name="P32"/>
      <text:p text:style-name="P32"/>
      <text:p text:style-name="P32"/>
      <text:h text:style-name="P42" text:outline-level="1" loext:marker-style-name="T28"><text:bookmark-start text:name="__RefHeading___Toc1095_2539841754 Copy 1 Copy 1 Copy 1 Copy 1 Copy 3"/><text:span text:style-name="T25">Week 5: Database Integration and CRUD Operations</text:span><text:bookmark-end text:name="__RefHeading___Toc1095_2539841754 Copy 1 Copy 1 Copy 1 Copy 1 Copy 3"/></text:h>
      <text:h text:style-name="P37" text:outline-level="2" loext:marker-style-name="T17"><text:bookmark-start text:name="__RefHeading___Toc1097_2539841754 Copy 1 Copy 1 Copy 1 Copy 1 Copy 3"/>Required Evidence<text:bookmark-end text:name="__RefHeading___Toc1097_2539841754 Copy 1 Copy 1 Copy 1 Copy 1 Copy 3"/></text:h>
      <text:p text:style-name="P38" loext:marker-style-name="T15"/>
      <text:p text:style-name="P38" loext:marker-style-name="T15"/>
      <text:p text:style-name="P38" loext:marker-style-name="T15"/>
      <text:p text:style-name="P41"><draw:frame draw:style-name="fr8" draw:name="Image21" text:anchor-type="char" svg:width="6.9252in" svg:height="3.7571in" draw:z-index="40"><draw:image xlink:href="Pictures/10000000000007790000040EB1A316AE.png" xlink:type="simple" xlink:show="embed" xlink:actuate="onLoad" draw:mime-type="image/png"/></draw:frame><text:span text:style-name="T5"><draw:frame draw:style-name="fr3" draw:name="Frame21" text:anchor-type="as-char" draw:z-index="41"><draw:text-box fo:min-height="0.0161in" fo:min-width="0.0161in"><text:h text:style-name="P21" text:outline-level="3">Figure <text:span text:style-name="T23">1</text:span>:</text:h></draw:text-box></draw:frame></text:span><text:s/>Dashboard at phpMyAdmin for MySQL</text:p>
      <text:p text:style-name="P41"/>
      <text:p text:style-name="P38" loext:marker-style-name="T15"/>
      <text:p text:style-name="P38" loext:marker-style-name="T15"/>
      <text:p text:style-name="P38" loext:marker-style-name="T15"/>
      <text:p text:style-name="P38" loext:marker-style-name="T15"/>
      <text:p text:style-name="P41"><draw:frame draw:style-name="fr5" draw:name="Image21 Copy 1" text:anchor-type="char" svg:width="6.9252in" svg:height="3.7571in" draw:z-index="42"><draw:image xlink:href="Pictures/100000000000077F000004112228D0C6.png" xlink:type="simple" xlink:show="embed" xlink:actuate="onLoad" draw:mime-type="image/png"/></draw:frame><text:soft-page-break/><text:span text:style-name="T5"><draw:frame draw:style-name="fr3" draw:name="Frame22" text:anchor-type="as-char" draw:z-index="43"><draw:text-box fo:min-height="0.0161in" fo:min-width="0.0161in"><text:h text:style-name="P21" text:outline-level="3">Figure <text:span text:style-name="T23">2</text:span>:</text:h></draw:text-box></draw:frame></text:span><text:s/><text:span text:style-name="T27">Database creation</text:span></text:p>
      <text:p text:style-name="P38" loext:marker-style-name="T15"/>
      <text:p text:style-name="P41"><draw:frame draw:style-name="fr8" draw:name="Image22" text:anchor-type="char" svg:width="6.9252in" svg:height="3.098in" draw:z-index="44"><draw:image xlink:href="Pictures/10000000000004E80000023249323855.png" xlink:type="simple" xlink:show="embed" xlink:actuate="onLoad" draw:mime-type="image/png"/></draw:frame><text:span text:style-name="T5"><draw:frame draw:style-name="fr3" draw:name="Frame23" text:anchor-type="as-char" draw:z-index="45"><draw:text-box fo:min-height="0.0161in" fo:min-width="0.0161in"><text:h text:style-name="P21" text:outline-level="3">Figure <text:span text:style-name="T23">3</text:span>:</text:h></draw:text-box></draw:frame></text:span><text:s/>Tables for hospitalward created</text:p>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41"/>
      <text:p text:style-name="P41"><text:soft-page-break/></text:p>
      <text:p text:style-name="P41"><draw:frame draw:style-name="fr9" draw:name="Image23" text:anchor-type="char" svg:width="5.5417in" svg:height="1.7811in" draw:z-index="46"><draw:image xlink:href="Pictures/10000000000002DF000000BEB9A8DCE8.png" xlink:type="simple" xlink:show="embed" xlink:actuate="onLoad" draw:mime-type="image/png"/></draw:frame><text:span text:style-name="T5"><draw:frame draw:style-name="fr3" draw:name="Frame24" text:anchor-type="as-char" draw:z-index="47"><draw:text-box fo:min-height="0.0161in" fo:min-width="0.0161in"><text:h text:style-name="P21" text:outline-level="3">Figure <text:span text:style-name="T20">4</text:span>:</text:h></draw:text-box></draw:frame></text:span><text:s/><text:span text:style-name="T29">Ward</text:span> table <text:span text:style-name="T29">has columns for data</text:span></text:p>
      <text:p text:style-name="P41"/>
      <text:p text:style-name="P41"><draw:frame draw:style-name="fr8" draw:name="Image24" text:anchor-type="char" svg:width="6.9252in" svg:height="3.0457in" draw:z-index="48"><draw:image xlink:href="Pictures/10000000000002DC00000142CD760833.png" xlink:type="simple" xlink:show="embed" xlink:actuate="onLoad" draw:mime-type="image/png"/></draw:frame><text:span text:style-name="T5"><draw:frame draw:style-name="fr3" draw:name="Frame25" text:anchor-type="as-char" draw:z-index="49"><draw:text-box fo:min-height="0.0161in" fo:min-width="0.0161in"><text:h text:style-name="P21" text:outline-level="3">Figure <text:span text:style-name="T23">5</text:span>:</text:h></draw:text-box></draw:frame></text:span><text:s/>Database connection code using PDO</text:p>
      <text:p text:style-name="P41"/>
      <text:p text:style-name="P43"><draw:frame draw:style-name="fr9" draw:name="Image25" text:anchor-type="char" svg:width="6.698in" svg:height="1.3335in" draw:z-index="50"><draw:image xlink:href="Pictures/1000000000000283000000802722B432.png" xlink:type="simple" xlink:show="embed" xlink:actuate="onLoad" draw:mime-type="image/png"/></draw:frame><text:span text:style-name="T19"><draw:frame draw:style-name="fr3" draw:name="Frame26" text:anchor-type="as-char" draw:z-index="51"><draw:text-box fo:min-height="0.0161in" fo:min-width="0.0161in"><text:h text:style-name="P21" text:outline-level="3">Figure <text:span text:style-name="T23">6</text:span>:</text:h></draw:text-box></draw:frame></text:span><text:span text:style-name="T21"><text:s/>User data is fetched from the db for authentication</text:span></text:p>
      <text:p text:style-name="P44"/>
      <text:p text:style-name="P44"/>
      <text:p text:style-name="P44"/>
      <text:p text:style-name="P44"/>
      <text:p text:style-name="P45"><text:soft-page-break/>Student Reflection</text:p>
      <text:p text:style-name="P35" loext:marker-style-name="T15"><text:span text:style-name="T15">This week I connected the full system to the MySQL database. The add-patient.php page takes patient details (name, age, gender, ward, diagnosis, room number, admission date, and notes) and inserts them into the patients table using a prepared PDO statement. The dashboard.php page retrieves all patients for the logged-in user using a JOIN between the patients and wards tables. I also implemented discharge (UPDATE) and delete (DELETE) operation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chapter">
      <style:paragraph-properties fo:margin-top="0.1665in" fo:margin-bottom="0.0693in" style:contextual-spacing="false"/>
      <style:text-properties fo:color="#000000" loext:opacity="100%" style:font-name="Arial" fo:font-family="Arial" style:font-family-generic="swiss"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default-outline-level="1" style:list-style-name="" style:class="chapter">
      <style:paragraph-properties fo:margin-top="0.2083in" fo:margin-bottom="0.0835in" style:contextual-spacing="false"/>
      <style:text-properties fo:color="#1f3864" loext:opacity="100%" style:font-name="Arial" fo:font-family="Arial" style:font-family-generic="swiss"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563c1"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0T14:24:53.329787237</meta:creation-date>
    <dc:date>2026-06-11T18:32:38.073875393</dc:date>
    <meta:editing-duration>PT21M24S</meta:editing-duration>
    <meta:editing-cycles>2</meta:editing-cycles>
    <meta:generator>LibreOffice/26.2.2.2$Linux_X86_64 LibreOffice_project/620$Build-2</meta:generator>
    <meta:document-statistic meta:table-count="0" meta:image-count="26" meta:object-count="0" meta:page-count="20" meta:paragraph-count="88" meta:word-count="685" meta:character-count="4647" meta:non-whitespace-character-count="4020"/>
  </office:meta>
</office:document-meta>
</file>